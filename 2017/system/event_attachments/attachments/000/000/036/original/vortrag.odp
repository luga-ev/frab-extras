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1000001E504427124.png" manifest:media-type="image/png"/>
  <manifest:file-entry manifest:full-path="Pictures/10000201000003CA0000025865E17F0A.png" manifest:media-type="image/png"/>
  <manifest:file-entry manifest:full-path="Pictures/10000201000003CA00000258472F7A11.png" manifest:media-type="image/png"/>
  <manifest:file-entry manifest:full-path="Pictures/10000201000001B6000001B67E84A3B7.png" manifest:media-type="image/png"/>
  <manifest:file-entry manifest:full-path="Pictures/1000020100000190000001F44691C8D9.png" manifest:media-type="image/png"/>
  <manifest:file-entry manifest:full-path="Pictures/10000201000001F4000001F4E1386E39.png" manifest:media-type="image/png"/>
  <manifest:file-entry manifest:full-path="Pictures/10000201000003CA0000025801672C49.png" manifest:media-type="image/png"/>
  <manifest:file-entry manifest:full-path="Pictures/10000201000003CA00000258699904CE.png" manifest:media-type="image/png"/>
  <manifest:file-entry manifest:full-path="Pictures/10000201000003CA0000025805B758CD.png" manifest:media-type="image/png"/>
  <manifest:file-entry manifest:full-path="Pictures/100002010000033A000002588A75F657.png" manifest:media-type="image/png"/>
  <manifest:file-entry manifest:full-path="Pictures/10000201000003CA00000258F9F66FFE.png" manifest:media-type="image/png"/>
  <manifest:file-entry manifest:full-path="Pictures/100002010000024400000280EFEB84AC.png" manifest:media-type="image/png"/>
  <manifest:file-entry manifest:full-path="Pictures/10000201000001B6000001B60F5936FB.png" manifest:media-type="image/png"/>
  <manifest:file-entry manifest:full-path="Pictures/10000000000001500000015D4ADE374F.png" manifest:media-type="image/png"/>
  <manifest:file-entry manifest:full-path="Pictures/10000201000003CA000002584FF1BCB6.png" manifest:media-type="image/png"/>
  <manifest:file-entry manifest:full-path="Pictures/10000201000003CA0000025827102F69.png" manifest:media-type="image/png"/>
  <manifest:file-entry manifest:full-path="Pictures/10000201000001B6000001B68E1A9260.png" manifest:media-type="image/png"/>
  <manifest:file-entry manifest:full-path="Pictures/10000201000001B6000001B6A9FA8587.png" manifest:media-type="image/png"/>
  <manifest:file-entry manifest:full-path="Pictures/100002010000008800000088A46E35E9.png" manifest:media-type="image/png"/>
  <manifest:file-entry manifest:full-path="Pictures/10000201000003CA00000258B8E8231E.png" manifest:media-type="image/png"/>
  <manifest:file-entry manifest:full-path="Pictures/100002010000008600000089DDA02638.png" manifest:media-type="image/png"/>
  <manifest:file-entry manifest:full-path="Pictures/1000020100000096000000A073B04559.png" manifest:media-type="image/png"/>
  <manifest:file-entry manifest:full-path="Pictures/10000000000001C20000010FFAEF13D2.jpg" manifest:media-type="image/jpeg"/>
  <manifest:file-entry manifest:full-path="Pictures/10000201000003CA0000025899D6DCFE.png" manifest:media-type="image/png"/>
  <manifest:file-entry manifest:full-path="Pictures/10000201000003CA00000258985343FD.png" manifest:media-type="image/png"/>
  <manifest:file-entry manifest:full-path="Pictures/10000000000002D0000001E059DDCEEF.jpg" manifest:media-type="image/jpeg"/>
  <manifest:file-entry manifest:full-path="Pictures/10000201000001AB000002800FC18C43.png" manifest:media-type="image/png"/>
  <manifest:file-entry manifest:full-path="Pictures/10000201000001B6000001B6BCFF18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134cm" fo:min-width="23.277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817cm"/>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1" style:family="graphic" style:parent-style-name="objectwithoutfill">
      <style:graphic-properties svg:stroke-width="0.1cm" svg:stroke-color="#33cc66" draw:marker-start-width="0.35cm" draw:marker-end-width="0.35cm" draw:fill="none"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737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4.786cm"/>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957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76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02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06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296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fo:min-height="13.364cm"/>
    </style:style>
    <style:style style:name="pr6" style:family="presentation" style:parent-style-name="Standard-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14pt" style:font-size-asian="14pt" style:font-size-complex="14pt"/>
    </style:style>
    <style:style style:name="T4"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layer="layout" svg:width="25.199cm" svg:height="16.255cm" svg:x="1.6cm" svg:y="2.545cm" presentation:class="subtitle" presentation:user-transformed="true">
          <draw:text-box>
            <text:p><text:span text:style-name="T1">Orgmode</text:span></text:p>
            <text:p><text:span text:style-name="T2">Your life in plain text</text:span></text:p>
            <text:p/>
            <text:p>Rainer König</text:p>
            <text:p/>
            <text:p><text:span text:style-name="T3">Attribution-NonCommercial 4.0 International (CC BY-NC 4.0)</text:span></text:p>
            <text:p><text:span text:style-name="T3"/></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Vorstellung des Referenten:</text:p>
              <text:p>- 56 Jahre alt</text:p>
              <text:p>- Diplom-Informatiker (studierte 1980-84 an FHA)</text:p>
              <text:p>- Verheiratet, 2 Kinder im pubertierendem Alter ;-)</text:p>
              <text:p>- Möchte es sich so leicht wie möglich machen und ist daher so gut organisiert wie es nur geht</text:p>
              <text:p>- Macht seit vielen Jahren „orgmode“, hat aber auch andere Apps durchprobiert um reuemütig zu „orgmode“ zurückzukehren</text:p>
              <text:p>- Hat vor einem Jahr eine Serie von orgmode-Videos auf YouTube angefangen, mittlerweile über 30 Videos und knapp 1000 Abonnenten auf dem Kanal</text:p>
              <text:p/>
              <text:p/>
            </draw:text-box>
          </draw:frame>
        </presentation:notes>
      </draw:page>
      <draw:page draw:name="page2" draw:style-name="dp1" draw:master-page-name="Standard" presentation:presentation-page-layout-name="AL2T3">
        <office:forms form:automatic-focus="false" form:apply-design-mode="false"/>
        <draw:frame draw:style-name="gr2" draw:text-style-name="P1" draw:layer="layout" svg:width="8.125cm" svg:height="12.179cm" svg:x="3.485cm" svg:y="4.913cm" presentation:class="graphic">
          <draw:image xlink:href="Pictures/10000201000001AB000002800FC18C43.png" xlink:type="simple" xlink:show="embed" xlink:actuate="onLoad">
            <text:p/>
          </draw:image>
        </draw:frame>
        <draw:frame presentation:style-name="pr3" draw:layer="layout" svg:width="25.199cm" svg:height="3.506cm" svg:x="1.4cm" svg:y="0.837cm" presentation:class="title">
          <draw:text-box>
            <text:p>Ziele dieses Vortrags</text:p>
          </draw:text-box>
        </draw:frame>
        <draw:frame presentation:style-name="pr4" draw:layer="layout" svg:width="12.297cm" svg:height="12.179cm" svg:x="14.313cm" svg:y="4.914cm" presentation:class="outline">
          <draw:text-box>
            <text:list text:style-name="L3">
              <text:list-item>
                <text:p>Neugierig machen auf Orgmode</text:p>
              </text:list-item>
              <text:list-item>
                <text:p>Keine vollständige Einführung, das würde zu lange dauer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draw:text-box>
              <text:p><text:span text:style-name="T4">- Der Vortrag soll Interesse wecken</text:span></text:p>
              <text:p><text:span text:style-name="T4">- Eine tiefere Einführung ist in der Kürze der Zeit nicht möglich, allein die Tutorial-Videos dauern zusammengenommen ca. 6 Stunden</text:span></text:p>
              <text:p><text:span text:style-name="T4"/></text:p>
            </draw:text-box>
          </draw:frame>
        </presentation:notes>
      </draw:page>
      <draw:page draw:name="page3" draw:style-name="dp1" draw:master-page-name="Standard">
        <office:forms form:automatic-focus="false" form:apply-design-mode="false"/>
        <draw:frame draw:style-name="gr3" draw:text-style-name="P1" draw:layer="layout" svg:width="24.884cm" svg:height="16.589cm" svg:x="1.646cm" svg:y="1.55cm">
          <draw:image xlink:href="Pictures/10000000000002D0000001E059DDCEEF.jpg" xlink:type="simple" xlink:show="embed" xlink:actuate="onLoad">
            <text:p/>
          </draw:image>
        </draw:frame>
        <draw:frame draw:style-name="gr4" draw:layer="layout" svg:width="23.777cm" svg:height="2.384cm" svg:x="2.023cm" svg:y="18.4cm">
          <draw:text-box>
            <text:p>By By Aaron Logan (from http://www.lightmatter.net/gallery/albums.php) </text:p>
            <text:p>[CC BY 2.5 (http://creativecommons.org/licenses/by/2.5)], via Wikimedia Commons</text:p>
            <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Das Problem:</text:p>
              <text:p>- Zu viel zu tun</text:p>
              <text:p>- Kein Überblick mehr</text:p>
              <text:p>- Nur noch reagieren statt agieren</text:p>
              <text:p>- Stress pur</text:p>
              <text:p/>
            </draw:text-box>
          </draw:frame>
        </presentation:notes>
      </draw:page>
      <draw:page draw:name="page4" draw:style-name="dp1" draw:master-page-name="Standard" presentation:presentation-page-layout-name="AL3T1">
        <office:forms form:automatic-focus="false" form:apply-design-mode="false"/>
        <draw:frame draw:style-name="gr2" draw:text-style-name="P1" draw:layer="layout" svg:width="9.784cm" svg:height="5.892cm" svg:x="1.616cm" svg:y="11.4cm" presentation:class="graphic" presentation:user-transformed="true">
          <draw:image xlink:href="Pictures/10000000000001C20000010FFAEF13D2.jpg" xlink:type="simple" xlink:show="embed" xlink:actuate="onLoad">
            <text:p/>
          </draw:image>
        </draw:frame>
        <draw:frame presentation:style-name="pr3" draw:layer="layout" svg:width="25.199cm" svg:height="3.506cm" svg:x="1.4cm" svg:y="0.837cm" presentation:class="title">
          <draw:text-box>
            <text:p>Ausweg = Selbstorganisation</text:p>
          </draw:text-box>
        </draw:frame>
        <draw:frame draw:style-name="gr3" draw:text-style-name="P1" draw:layer="layout" svg:width="3.809cm" svg:height="4.063cm" svg:x="19.991cm" svg:y="12.8cm">
          <draw:image xlink:href="Pictures/1000020100000096000000A073B04559.png" xlink:type="simple" xlink:show="embed" xlink:actuate="onLoad">
            <text:p/>
          </draw:image>
        </draw:frame>
        <draw:frame draw:style-name="gr5" draw:layer="layout" svg:width="3.144cm" svg:height="0.962cm" svg:x="20.456cm" svg:y="16.838cm">
          <draw:text-box>
            <text:p>Orgmode</text:p>
          </draw:text-box>
        </draw:frame>
        <draw:frame draw:style-name="gr6" draw:layer="layout" svg:width="3.317cm" svg:height="0.962cm" svg:x="4.216cm" svg:y="17.438cm">
          <draw:text-box>
            <text:p>Notizbuch</text:p>
          </draw:text-box>
        </draw:frame>
        <draw:frame draw:style-name="gr2" draw:text-style-name="P1" draw:layer="layout" svg:width="6.6cm" svg:height="6.6cm" svg:x="11.6cm" svg:y="4.6cm">
          <draw:image xlink:href="Pictures/100002010000008800000088A46E35E9.png" xlink:type="simple" xlink:show="embed" xlink:actuate="onLoad">
            <text:p text:style-name="P1">Trusted</text:p>
            <text:p text:style-name="P1">System</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draw:text-box>
              <text:p>Hinweis auf „Getting things done“ von David Allen. Wichtig ist das Konzept des „trusted system“, dem Ding dem wir unsere Aufgabenliste anvertrauen.</text:p>
              <text:p>Könnte ein Notizbuch sein, aber als Geeks machen wir das mit Orgmode</text:p>
              <text:p/>
            </draw:text-box>
          </draw:frame>
        </presentation:notes>
      </draw:page>
      <draw:page draw:name="page5" draw:style-name="dp1" draw:master-page-name="Standard">
        <office:forms form:automatic-focus="false" form:apply-design-mode="false"/>
        <draw:frame presentation:style-name="pr3" draw:layer="layout" svg:width="25.199cm" svg:height="3.506cm" svg:x="1.4cm" svg:y="0.837cm" presentation:class="title">
          <draw:text-box>
            <text:p>„Nachteile“ von Orgmode </text:p>
          </draw:text-box>
        </draw:frame>
        <draw:path draw:style-name="gr7" draw:text-style-name="P1" draw:layer="layout" svg:width="28.508cm" svg:height="6.16cm" draw:transform="skewX (8.48409047277397E-017) rotate (0.540353936417444) translate (-1.01628361774659cm 15.5832620928628cm)" svg:viewBox="0 0 28509 6161" svg:d="M0 4697c8683-11363 28509 1464 28509 1464">
          <text:p/>
        </draw:path>
        <draw:line draw:style-name="gr8" draw:text-style-name="P1" draw:layer="layout" svg:x1="1.4cm" svg:y1="19.611cm" svg:x2="26.4cm" svg:y2="19.611cm">
          <text:p/>
        </draw:line>
        <draw:line draw:style-name="gr8" draw:text-style-name="P1" draw:layer="layout" svg:x1="1.4cm" svg:y1="19.611cm" svg:x2="1.4cm" svg:y2="3.6cm">
          <text:p/>
        </draw:line>
        <draw:frame draw:style-name="gr9" draw:layer="layout" svg:width="1.56cm" svg:height="0.962cm" svg:x="24.24cm" svg:y="18.4cm">
          <draw:text-box>
            <text:p>Zeit</text:p>
          </draw:text-box>
        </draw:frame>
        <draw:frame draw:style-name="gr10" draw:layer="layout" svg:width="2.581cm" svg:height="0.962cm" svg:x="1.419cm" svg:y="4.6cm">
          <draw:text-box>
            <text:p>Wissen</text:p>
          </draw:text-box>
        </draw:frame>
        <draw:line draw:style-name="gr11" draw:text-style-name="P1" draw:layer="layout" svg:x1="1.4cm" svg:y1="19.611cm" svg:x2="26.4cm" svg:y2="6.4cm">
          <text:p/>
        </draw:lin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draw:text-box>
              <text:p>Ein Blick ins Orgmode-Handbuch (300 Seiten!) lässt den Anfänger schaudern und er fürchtet eine Lernkurve wie die rote Linie in der Graphik</text:p>
              <text:p/>
              <text:p>Wenn man abrer systematisch an das Thema ran geht, dann wird die Lernkurve eher flach und linear so wie die grüne Linie</text:p>
              <text:p/>
            </draw:text-box>
          </draw:frame>
        </presentation:notes>
      </draw:page>
      <draw:page draw:name="page6" draw:style-name="dp1" draw:master-page-name="Standard" presentation:presentation-page-layout-name="AL4T19">
        <office:forms form:automatic-focus="false" form:apply-design-mode="false"/>
        <draw:frame presentation:style-name="pr6" draw:layer="layout" svg:width="25.199cm" svg:height="3.506cm" svg:x="1.4cm" svg:y="0.837cm" presentation:class="title" presentation:user-transformed="true">
          <draw:text-box>
            <text:p>Vorteile von Orgmode</text:p>
          </draw:text-box>
        </draw:frame>
        <draw:g>
          <draw:frame draw:style-name="gr12" draw:layer="layout" svg:width="3.237cm" svg:height="0.962cm" svg:x="6.963cm" svg:y="10.161cm">
            <draw:text-box>
              <text:p>Plain Text</text:p>
            </draw:text-box>
          </draw:frame>
          <draw:frame draw:style-name="gr2" draw:text-style-name="P1" draw:layer="layout" svg:width="5.761cm" svg:height="5.761cm" svg:x="6cm" svg:y="4.6cm">
            <draw:image xlink:href="Pictures/10000201000001B6000001B6A9FA8587.png" xlink:type="simple" xlink:show="embed" xlink:actuate="onLoad">
              <text:p text:style-name="P1"/>
            </draw:image>
          </draw:frame>
        </draw:g>
        <draw:g>
          <draw:frame draw:style-name="gr3" draw:text-style-name="P1" draw:layer="layout" svg:width="5.2cm" svg:height="5.2cm" svg:x="18cm" svg:y="5.127cm">
            <draw:image xlink:href="Pictures/10000201000001B6000001B6BCFF1808.png" xlink:type="simple" xlink:show="embed" xlink:actuate="onLoad">
              <text:p/>
            </draw:image>
          </draw:frame>
          <draw:frame draw:style-name="gr13" draw:layer="layout" svg:width="5.286cm" svg:height="1.673cm" svg:x="17.6cm" svg:y="10.327cm">
            <draw:text-box>
              <text:p text:style-name="P1">Daten unter<text:line-break/>eigener Kontrolle</text:p>
            </draw:text-box>
          </draw:frame>
        </draw:g>
        <draw:g>
          <draw:frame draw:style-name="gr3" draw:text-style-name="P1" draw:layer="layout" svg:width="5.702cm" svg:height="5.702cm" svg:x="5.6cm" svg:y="11.927cm">
            <draw:image xlink:href="Pictures/10000201000001B6000001B60F5936FB.png" xlink:type="simple" xlink:show="embed" xlink:actuate="onLoad">
              <text:p/>
            </draw:image>
          </draw:frame>
          <draw:frame draw:style-name="gr14" draw:text-style-name="P1" draw:layer="layout" svg:width="3.457cm" svg:height="1.673cm" svg:x="7.143cm" svg:y="18.127cm">
            <draw:text-box>
              <text:p text:style-name="P1">Flexibel<text:line-break/>anpassbar</text:p>
            </draw:text-box>
          </draw:frame>
        </draw:g>
        <draw:g>
          <draw:frame draw:style-name="gr3" draw:text-style-name="P1" draw:layer="layout" svg:width="4.135cm" svg:height="4.135cm" svg:x="17.665cm" svg:y="13.6cm">
            <draw:image xlink:href="Pictures/10000201000001B6000001B68E1A9260.png" xlink:type="simple" xlink:show="embed" xlink:actuate="onLoad">
              <text:p/>
            </draw:image>
          </draw:frame>
          <draw:frame draw:style-name="gr15" draw:layer="layout" svg:width="2.576cm" svg:height="0.962cm" svg:x="18.624cm" svg:y="17.638cm">
            <draw:text-box>
              <text:p>Schnell</text:p>
            </draw:text-box>
          </draw:frame>
        </draw:g>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user-transformed="true">
            <draw:text-box>
              <text:p>Wichtigste Vorteile im Vergleich zu den „bunten Apps“</text:p>
              <text:p/>
              <text:p>Plain Text, das kann auch in 30 Jahren noch gelesen und verstanden werden wenn Mitbewerber mit binären Formaten längst vom „Markt“ verschwunden sind</text:p>
              <text:p>Kontrolle über die Daten, wo und was gespeichert ist, ganz wichtig im Zeitalter von NSA. Und man hängt nicht an der Nabelschnur eines Anbieters der plötzlich seinen Service dicht macht.</text:p>
              <text:p>Flexible Anpassung an die eigenen Bedürfnisse ist möglich. Kein Zwangskorsett wie bei anderen Apps</text:p>
              <text:p>Superschnell, kein „ich brauch mal ein (lahmes Netz) oder ich muss mich durch 20 Formulare klicken um was zu erfassen</text:p>
              <text:p/>
            </draw:text-box>
          </draw:frame>
        </presentation:notes>
      </draw:page>
      <draw:page draw:name="page7" draw:style-name="dp1" draw:master-page-name="Standard" presentation:presentation-page-layout-name="AL4T19">
        <office:forms form:automatic-focus="false" form:apply-design-mode="false"/>
        <draw:frame presentation:style-name="pr3" draw:layer="layout" svg:width="25.199cm" svg:height="3.506cm" svg:x="1.4cm" svg:y="0.837cm" presentation:class="title" presentation:user-transformed="true">
          <draw:text-box>
            <text:p>Einstieg: Braindump</text:p>
          </draw:text-box>
        </draw:frame>
        <draw:frame draw:style-name="gr3" draw:text-style-name="P1" draw:layer="layout" svg:width="4.251cm" svg:height="4.69cm" svg:x="0.8cm" svg:y="0.6cm">
          <draw:image xlink:href="Pictures/100002010000024400000280EFEB84AC.png" xlink:type="simple" xlink:show="embed" xlink:actuate="onLoad">
            <text:p/>
          </draw:image>
        </draw:frame>
        <draw:frame draw:style-name="gr3" draw:text-style-name="P1" draw:layer="layout" svg:width="21.854cm" svg:height="15.874cm" svg:x="5.146cm" svg:y="4.126cm">
          <draw:image xlink:href="Pictures/100002010000033A000002588A75F65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user-transformed="true">
            <draw:text-box>
              <text:p>Braindump</text:p>
              <text:p/>
              <text:p>Alles aufschreiben was einem im Kopf rumspukt</text:p>
              <text:p/>
              <text:p>Erst mal alls auf einem Überschriften-Niveau</text:p>
              <text:p/>
              <text:p>Ganz wichtig: </text:p>
              <text:p>Nicht nur die „muss erledigt werden“-Dinge aufschreiben sondern auch die „macht-mir-Spaß“-Dinge aufschreiben. Sonst wird das „Trusted-System“ eher als „Sklaventreiber“ denn als „Assistent“ angesehen.</text:p>
              <text:p/>
              <text:p/>
            </draw:text-box>
          </draw:frame>
        </presentation:notes>
      </draw:page>
      <draw:page draw:name="page8"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Gruppieren &amp; Ordnen</text:p>
          </draw:text-box>
        </draw:frame>
        <draw:frame draw:style-name="gr3" draw:text-style-name="P1" draw:layer="layout" svg:width="25.664cm" svg:height="15.874cm" svg:x="1.235cm" svg:y="4.187cm">
          <draw:image xlink:href="Pictures/10000201000003CA00000258B8E8231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draw:text-box>
              <text:p>Wenn alles aufgeschrieben ist können die Zeilen verschoben und eingerückt werden (Outliner)</text:p>
              <text:p/>
              <text:p>Außerdem kann man :TAGS: vergeben um ein weiteres Ordnungskriterium zu haben</text:p>
              <text:p/>
            </draw:text-box>
          </draw:frame>
        </presentation:notes>
      </draw:page>
      <draw:page draw:name="page9"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Checklisten</text:p>
          </draw:text-box>
        </draw:frame>
        <draw:frame draw:style-name="gr3" draw:text-style-name="P1" draw:layer="layout" svg:width="25.664cm" svg:height="15.874cm" svg:x="1.235cm" svg:y="4.187cm">
          <draw:image xlink:href="Pictures/10000201000003CA0000025899D6DCF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draw:text-box>
              <text:p>Checklisten sind eine einfache Möglichkeit, Dinge die notwednig sind abzuhaken. Die Überschrift der Checkliste kann dabei anzeigen, wieviel schon davon abgearbeitet ist</text:p>
              <text:p/>
            </draw:text-box>
          </draw:frame>
        </presentation:notes>
      </draw:page>
      <draw:page draw:name="page10"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ToDo-Keywords zuweisen</text:p>
          </draw:text-box>
        </draw:frame>
        <draw:frame draw:style-name="gr3" draw:text-style-name="P1" draw:layer="layout" svg:width="25.664cm" svg:height="15.874cm" svg:x="1.136cm" svg:y="3.926cm">
          <draw:image xlink:href="Pictures/10000201000003CA00000258699904C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user-transformed="true">
            <draw:text-box>
              <text:p>ToDo-Keywords bestimmen den aktuellen Status</text:p>
              <text:p/>
              <text:p>REPEAT – Wiederholende Aufgaben</text:p>
              <text:p>NEXT – Kann ich sofort wenn ich Zeit habe machen</text:p>
              <text:p>TODO – Muss ich machen, braucht aber noch was</text:p>
              <text:p>WAITING – Ich warte auf jemand anderesn</text:p>
              <text:p>PROJ – Project, Sammelbegriff für mehrere Tasks</text:p>
              <text:p>DELEGATED – Jemand anders machts und sagt wenn er fertig ist</text:p>
              <text:p>DONE – Die Aufgabe ist abgeschlossen</text:p>
              <text:p>CANCELLED – Die Aufgabe wurde verworfen</text:p>
              <text:p>FORWARDED – Jemand anders kümmert sich drum, nicht meine Baustelle</text:p>
            </draw:text-box>
          </draw:frame>
        </presentation:notes>
      </draw:page>
      <draw:page draw:name="page11"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Planung: Schedules &amp; Deadlines</text:p>
          </draw:text-box>
        </draw:frame>
        <draw:frame draw:style-name="gr3" draw:text-style-name="P1" draw:layer="layout" svg:width="25.664cm" svg:height="15.874cm" svg:x="1.4cm" svg:y="4.126cm">
          <draw:image xlink:href="Pictures/10000201000003CA0000025801672C4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user-transformed="true">
            <draw:text-box>
              <text:p>Schedule:</text:p>
              <text:p>Datum an dem ich mit dieser Aufgabe anfangen möchte</text:p>
              <text:p/>
              <text:p>Deadline:</text:p>
              <text:p>Datum an dem die Aufgabe abgeschlossen sein muss</text:p>
              <text:p/>
              <text:p>Repeating Schedules/Deadlines sind möglich, z.B. alle 12 Wochen oder alle 3 Tage</text:p>
              <text:p/>
              <text:p>Ein Hinweis zu Prioritäten: Prioritäten spielen in diesem Konzept keine große Rolle, wir picken die Aufgaben nach „verfügbarer Enerrgie“ raus.</text:p>
              <text:p/>
            </draw:text-box>
          </draw:frame>
        </presentation:notes>
      </draw:page>
      <draw:page draw:name="page12"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Agenda Views</text:p>
          </draw:text-box>
        </draw:frame>
        <draw:frame draw:style-name="gr3" draw:text-style-name="P1" draw:layer="layout" svg:width="8.2cm" svg:height="10.654cm" svg:x="1cm" svg:y="5.746cm">
          <draw:image xlink:href="Pictures/1000020100000190000001F44691C8D9.png" xlink:type="simple" xlink:show="embed" xlink:actuate="onLoad">
            <text:p/>
          </draw:image>
        </draw:frame>
        <draw:frame draw:style-name="gr3" draw:text-style-name="P1" draw:layer="layout" svg:width="3.781cm" svg:height="3.865cm" svg:x="11.4cm" svg:y="8.735cm">
          <draw:image xlink:href="Pictures/100002010000008600000089DDA02638.png" xlink:type="simple" xlink:show="embed" xlink:actuate="onLoad">
            <text:p/>
          </draw:image>
        </draw:frame>
        <draw:frame draw:style-name="gr3" draw:text-style-name="P1" draw:layer="layout" svg:width="12.361cm" svg:height="12.361cm" svg:x="0.839cm" svg:y="6.8cm">
          <draw:image xlink:href="Pictures/10000201000001B6000001B67E84A3B7.png" xlink:type="simple" xlink:show="embed" xlink:actuate="onLoad">
            <text:p/>
          </draw:image>
        </draw:frame>
        <draw:frame draw:style-name="gr3" draw:text-style-name="P1" draw:layer="layout" svg:width="12.361cm" svg:height="12.361cm" svg:x="15cm" svg:y="5.8cm">
          <draw:image xlink:href="Pictures/10000201000001B6000001B6A9FA858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draw:text-box>
              <text:p>Agenda Views</text:p>
              <text:p/>
              <text:p>Die Org-Datei enthält den ganzen Berg an Aufgaben, das würde uns aber nur verunsichern wenn wir immer alles sehen müssten</text:p>
              <text:p/>
              <text:p>Eine Agenda-View pickt also das raus, was uns aus diesem Berg an Aufgaben aktuell interessiert</text:p>
              <text:p/>
            </draw:text-box>
          </draw:frame>
        </presentation:notes>
      </draw:page>
      <draw:page draw:name="page13"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Agenda Beispiel: Wochenansicht</text:p>
          </draw:text-box>
        </draw:frame>
        <draw:frame draw:style-name="gr3" draw:text-style-name="P1" draw:layer="layout" svg:width="25.664cm" svg:height="15.874cm" svg:x="1.2cm" svg:y="4cm">
          <draw:image xlink:href="Pictures/10000201000003CA0000025827102F6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draw:text-box>
              <text:p>Die Wochenansicht zeigt einfach an, welche Aufgaben an welchen Tagen geplant wurden. Oder wo die Deadlines sind. Und was alles geade beareitet werden soll. Kann auch Tagesansicht sein.</text:p>
              <text:p/>
              <text:p/>
            </draw:text-box>
          </draw:frame>
        </presentation:notes>
      </draw:page>
      <draw:page draw:name="page14"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Agenda-Beispiel: ToDo Keywords</text:p>
          </draw:text-box>
        </draw:frame>
        <draw:frame draw:style-name="gr3" draw:text-style-name="P1" draw:layer="layout" svg:width="25.664cm" svg:height="15.874cm" svg:x="1.336cm" svg:y="4.326cm">
          <draw:image xlink:href="Pictures/10000201000003CA00000258472F7A1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user-transformed="true">
            <draw:text-box>
              <text:p>Agendas basierend auf ToDo-Keywords können z.B. alle „NEXT“-Actions auflisten.</text:p>
            </draw:text-box>
          </draw:frame>
        </presentation:notes>
      </draw:page>
      <draw:page draw:name="page15"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Agenda-Beispiel: Tags</text:p>
          </draw:text-box>
        </draw:frame>
        <draw:frame draw:style-name="gr3" draw:text-style-name="P1" draw:layer="layout" svg:width="25.664cm" svg:height="15.874cm" svg:x="1.235cm" svg:y="4.187cm">
          <draw:image xlink:href="Pictures/10000201000003CA0000025865E17F0A.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user-transformed="true">
            <draw:text-box>
              <text:p>Agendas basierend auf TAGS können beispielsweise alle mit „:WARTUNG:“ markierten Aufgaben auflisten.</text:p>
              <text:p/>
              <text:p>Natürlich sind kombinierte Ansichten möglich. Beispiel: Zeige mir alle „NEXT“ mit Tag „;PHONE: an, dann habe ich eine Liste der zu erledigenden Anrufe.</text:p>
              <text:p/>
            </draw:text-box>
          </draw:frame>
        </presentation:notes>
      </draw:page>
      <draw:page draw:name="page16"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Drawer: Mehr Infos in Schubladen</text:p>
          </draw:text-box>
        </draw:frame>
        <draw:frame draw:style-name="gr3" draw:text-style-name="P1" draw:layer="layout" svg:width="25.664cm" svg:height="15.874cm" svg:x="1.235cm" svg:y="4cm">
          <draw:image xlink:href="Pictures/10000201000003CA00000258F9F66FF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user-transformed="true">
            <draw:text-box>
              <text:p>Drawer sind Textbereiche die man bequem mit TAB auf und zu klappen kann.</text:p>
              <text:p/>
              <text:p>:PROPERTIES: ist ein System-Drawer der Dinge wie z.b. eine ID (uniqe) enthält</text:p>
              <text:p/>
              <text:p>Der :LOGBOOK: Drawer kann Aufzeichnungen und Notizen um Verlauf der Aufgabe enthalten. Ist evtl. im Job ganz wichtig um seine Aktivitäten zu dokumentieren wenn einem jemand vorwirft, man würde das liegen lassen (Cover-your-ass-Strategie)</text:p>
              <text:p/>
            </draw:text-box>
          </draw:frame>
        </presentation:notes>
      </draw:page>
      <draw:page draw:name="page17" draw:style-name="dp1" draw:master-page-name="Standard" presentation:presentation-page-layout-name="AL4T19">
        <office:forms form:automatic-focus="false" form:apply-design-mode="false"/>
        <draw:frame presentation:style-name="pr3" draw:layer="layout" svg:width="25.199cm" svg:height="3.506cm" svg:x="1.4cm" svg:y="0.837cm" presentation:class="title">
          <draw:text-box>
            <text:p>Archivieren: Weg mit Erledigtem</text:p>
          </draw:text-box>
        </draw:frame>
        <draw:frame draw:style-name="gr3" draw:text-style-name="P1" draw:layer="layout" svg:width="14.565cm" svg:height="7.339cm" svg:x="0.8cm" svg:y="3.661cm">
          <draw:image xlink:href="Pictures/10000201000003CA000002584FF1BCB6.png" xlink:type="simple" xlink:show="embed" xlink:actuate="onLoad">
            <text:p/>
          </draw:image>
        </draw:frame>
        <draw:frame draw:style-name="gr3" draw:text-style-name="P1" draw:layer="layout" svg:width="11.702cm" svg:height="7.238cm" svg:x="6.4cm" svg:y="6.4cm">
          <draw:image xlink:href="Pictures/10000201000003CA0000025805B758CD.png" xlink:type="simple" xlink:show="embed" xlink:actuate="onLoad">
            <text:p/>
          </draw:image>
        </draw:frame>
        <draw:frame draw:style-name="gr3" draw:text-style-name="P1" draw:layer="layout" svg:width="11.64cm" svg:height="7.2cm" svg:x="14.96cm" svg:y="9.2cm">
          <draw:image xlink:href="Pictures/10000201000003CA00000258985343FD.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draw:text-box>
              <text:p>Erledigte Aufgaben müssen nicht gelöscht werden sondern können in ein Archiv verschoben werden. Vorteil: Man hat immer noch alle Aufzeichnungen und kann auch nach langer Zeit noch nachvollziehen was irgendwann zu irgend einem Thema unternommen wurde.</text:p>
              <text:p/>
            </draw:text-box>
          </draw:frame>
        </presentation:notes>
      </draw:page>
      <draw:page draw:name="page18" draw:style-name="dp1" draw:master-page-name="Standard" presentation:presentation-page-layout-name="AL4T19">
        <office:forms form:automatic-focus="false" form:apply-design-mode="false"/>
        <draw:frame presentation:style-name="pr3" draw:layer="layout" svg:width="25.199cm" svg:height="3.506cm" svg:x="1.4cm" svg:y="0.837cm" presentation:class="title" presentation:user-transformed="true">
          <draw:text-box>
            <text:p>Wichtig: Weekly Review!</text:p>
          </draw:text-box>
        </draw:frame>
        <draw:frame draw:style-name="gr3" draw:text-style-name="P1" draw:layer="layout" svg:width="5.689cm" svg:height="5.909cm" svg:x="2.6cm" svg:y="6.799cm">
          <draw:image xlink:href="Pictures/10000000000001500000015D4ADE374F.png" xlink:type="simple" xlink:show="embed" xlink:actuate="onLoad">
            <text:p/>
          </draw:image>
        </draw:frame>
        <draw:frame draw:style-name="gr16" draw:layer="layout" svg:width="3.529cm" svg:height="0.962cm" svg:x="3.8cm" svg:y="13.038cm">
          <draw:text-box>
            <text:p>Inbox Zero</text:p>
          </draw:text-box>
        </draw:frame>
        <draw:frame draw:style-name="gr3" draw:text-style-name="P1" draw:layer="layout" svg:width="5.164cm" svg:height="5.164cm" svg:x="11.2cm" svg:y="7.199cm">
          <draw:image xlink:href="Pictures/10000201000001F4000001F4E1386E39.png" xlink:type="simple" xlink:show="embed" xlink:actuate="onLoad">
            <text:p/>
          </draw:image>
        </draw:frame>
        <draw:frame draw:style-name="gr17" draw:layer="layout" svg:width="2.564cm" svg:height="0.962cm" svg:x="12.6cm" svg:y="13.038cm">
          <draw:text-box>
            <text:p>Review</text:p>
          </draw:text-box>
        </draw:frame>
        <draw:frame draw:style-name="gr3" draw:text-style-name="P1" draw:layer="layout" svg:width="5.356cm" svg:height="6cm" svg:x="19.644cm" svg:y="6.199cm">
          <draw:image xlink:href="Pictures/10000201000001B1000001E504427124.png" xlink:type="simple" xlink:show="embed" xlink:actuate="onLoad">
            <text:p/>
          </draw:image>
        </draw:frame>
        <draw:frame draw:style-name="gr18" draw:layer="layout" svg:width="3.796cm" svg:height="0.962cm" svg:x="20.534cm" svg:y="13.038cm">
          <draw:text-box>
            <text:p>New ideas?</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draw:text-box>
              <text:p>Wichtig ist die Weekly Review mit folgenden Grundbestand-Teilen</text:p>
              <text:p/>
              <text:p>INBOX ZERO: Leeren aller „Eingangskörbe“</text:p>
              <text:p/>
              <text:p>Review der Aufgaben, was ist erledigt, was kann verworfen werden, was braucht evtl. Folgeaktionen</text:p>
              <text:p/>
              <text:p>Eintragen neuer Ideen! </text:p>
              <text:p/>
            </draw:text-box>
          </draw:frame>
        </presentation:notes>
      </draw:page>
      <draw:page draw:name="page19"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Weitere Funktionen</text:p>
          </draw:text-box>
        </draw:frame>
        <draw:frame presentation:style-name="pr4" draw:layer="layout" svg:width="25.199cm" svg:height="12.179cm" svg:x="1.4cm" svg:y="4.914cm" presentation:class="outline">
          <draw:text-box>
            <text:list text:style-name="L3">
              <text:list-item>
                <text:p>Custom Agenda Views – was will ich sehen</text:p>
              </text:list-item>
              <text:list-item>
                <text:p>Capture Templates – Blitzschnell was eintragen</text:p>
                <text:list>
                  <text:list-item>
                    <text:p>Formulare für öfter ausgeführte Dinge nach gleichem Schema</text:p>
                  </text:list-item>
                  <text:list-item>
                    <text:p>Journal mit Ablage in einem „Date-Tree“</text:p>
                  </text:list-item>
                </text:list>
              </text:list-item>
              <text:list-item>
                <text:p>Zeiterfassung – Wie lange arbeite ich an was</text:p>
              </text:list-item>
              <text:list-item>
                <text:p>Countdown-Timer – Pomodoro Technik </text:p>
              </text:list-item>
              <text:list-item>
                <text:p>Links &amp; Attachments </text:p>
              </text:list-item>
              <text:list-item>
                <text:p>…. und vieles mehr</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layer="layout" svg:width="16.799cm" svg:height="13.38cm" svg:x="2.1cm" svg:y="14.107cm" presentation:class="notes" presentation:user-transformed="true">
            <draw:text-box>
              <text:p>Custom Agenda views sind nützlich für bestimmte Ansichten, die man immer wieder braucht, z.B. um die Weekly Review viel einfacher zu machen</text:p>
              <text:p/>
              <text:p>Capture Templates ist der Schlüssel zum blitzschnellen eintragen von Ideen, Aufgaben usw.</text:p>
              <text:p/>
              <text:p>Zeiterfassung, man sieht wie lange man an einer Aufgabe schon gearbeitet hat. Natürlich kann man auch Aufwandsabschätzungen eintragen.</text:p>
              <text:p/>
              <text:p>Countdown-Timer: Brainstorming für 5 min, Pomodoro für 25 min.</text:p>
              <text:p/>
              <text:p>Links ins Web, zu anderen Aufgaben etc. Attachments wenn man wirklich nicht mit Links das lösen kann</text:p>
            </draw:text-box>
          </draw:frame>
        </presentation:notes>
      </draw:page>
      <draw:page draw:name="page20"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Weiterführende Links</text:p>
          </draw:text-box>
        </draw:frame>
        <draw:frame presentation:style-name="pr4" draw:layer="layout" svg:width="25.199cm" svg:height="12.179cm" svg:x="1.4cm" svg:y="4.914cm" presentation:class="outline">
          <draw:text-box>
            <text:list text:style-name="L3">
              <text:list-item>
                <text:p>Orgmode Webseite: <text:a xlink:href="http://www.orgmode.org/" xlink:type="simple">http://www.orgmode.org/</text:a> </text:p>
              </text:list-item>
              <text:list-item>
                <text:p>Playlist Orgmode Tutorial:<text:line-break/><text:a xlink:href="https://www.youtube.com/watch?v=sQS06Qjnkcc&amp;list=PLVtKhBrRV_ZkPnBtt_TD1Cs9PJlU0IIdE" xlink:type="simple">https://www.youtube.com/watch?v=sQS06Qjnkcc&amp;list=PLVtKhBrRV_ZkPnBtt_TD1Cs9PJlU0IIdE</text:a></text:p>
              </text:list-item>
              <text:list-item>
                <text:p>Kontakt: rainer@koenig-haunstetten.de</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user-transformed="true">
            <draw:text-box>
              <text:p>Leider sind YouTube-Links immer so lange.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9T15:55:40.909449119</meta:creation-date>
    <dc:date>2017-04-15T17:03:45.170130642</dc:date>
    <meta:editing-duration>PT2H32M16S</meta:editing-duration>
    <meta:editing-cycles>28</meta:editing-cycles>
    <meta:generator>LibreOffice/4.3.3.2$Linux_X86_64 LibreOffice_project/430m0$Build-2</meta:generator>
    <meta:document-statistic meta:object-count="132"/>
  </office:meta>
</office:document-meta>
</file>